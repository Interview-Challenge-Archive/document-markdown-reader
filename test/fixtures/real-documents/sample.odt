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</office:automatic-styles>
  <office:body>
    <office:text text:use-soft-page-breaks="true">
      <text:p text:style-name="P1">Normal text section.</text:p>
      <text:p text:style-name="Normal"><text:span text:style-name="T2">Bold text section</text:span></text:p>
      <text:p text:style-name="Normal"><text:span text:style-name="T3">Italic text section</text:span></text:p>
      <text:list text:style-name="LFO1" text:continue-numbering="true">
        <text:list-item>
          <text:p text:style-name="P4">First list item</text:p>
        </text:list-item>
        <text:list-item>
          <text:p text:style-name="P5">Second list ite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aimondas Rimkevičius</dc:creator>
    <meta:creation-date>2026-03-22T19:15:00Z</meta:creation-date>
    <dc:date>2026-03-22T19:16:00Z</dc:date>
    <meta:template xlink:href="Normal.dotm" xlink:type="simple"/>
    <meta:editing-cycles>3</meta:editing-cycles>
    <meta:editing-duration>PT60S</meta:editing-duration>
    <meta:document-statistic meta:page-count="1" meta:paragraph-count="1" meta:word-count="13" meta:character-count="91" meta:row-count="1" meta:non-whitespace-character-count="79"/>
  </office:meta>
</office:document-meta>
</file>